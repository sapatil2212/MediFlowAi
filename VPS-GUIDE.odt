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size="12pt" style:font-size-asian="12pt" style:font-size-complex="12pt" fo:language="en" fo:country="US"/>
    </style:style>
    <style:style style:name="T9" style:parent-style-name="DefaultParagraphFont" style:family="text">
      <style:text-properties fo:font-size="12pt" style:font-size-asian="12pt" style:font-size-complex="12pt" fo:language="en" fo:country="US"/>
    </style:style>
    <style:style style:name="P10" style:parent-style-name="ListParagraph" style:list-style-name="LFO1" style:family="paragraph">
      <style:text-properties fo:font-weight="bold" style:font-weight-asian="bold" style:font-weight-complex="bold"/>
    </style:style>
    <style:style style:name="P11" style:parent-style-name="ListParagraph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5" style:parent-style-name="Normal" style:family="paragraph">
      <style:text-properties fo:font-size="12pt" style:font-size-asian="12pt" style:font-size-complex="12pt" fo:language="en" fo:country="US"/>
    </style:style>
    <style:style style:name="P16" style:parent-style-name="Normal" style:family="paragraph">
      <style:text-properties fo:font-size="12pt" style:font-size-asian="12pt" style:font-size-complex="12pt" fo:language="en" fo:country="US"/>
    </style:style>
    <style:style style:name="P17" style:parent-style-name="Normal" style:family="paragraph">
      <style:text-properties fo:font-size="12pt" style:font-size-asian="12pt" style:font-size-complex="12pt" fo:language="en" fo:country="US"/>
    </style:style>
    <style:style style:name="P18" style:parent-style-name="Normal" style:family="paragraph">
      <style:text-properties fo:font-size="12pt" style:font-size-asian="12pt" style:font-size-complex="12pt" fo:language="en" fo:country="US"/>
    </style:style>
    <style:style style:name="P19" style:parent-style-name="Normal" style:family="paragraph">
      <style:text-properties fo:font-size="12pt" style:font-size-asian="12pt" style:font-size-complex="12pt" fo:language="en" fo:country="US"/>
    </style:style>
    <style:style style:name="P20" style:parent-style-name="Normal" style:family="paragraph">
      <style:text-properties fo:font-size="12pt" style:font-size-asian="12pt" style:font-size-complex="12pt" fo:language="en" fo:country="US"/>
    </style:style>
    <style:style style:name="P21" style:parent-style-name="Normal" style:family="paragraph">
      <style:text-properties fo:font-size="12pt" style:font-size-asian="12pt" style:font-size-complex="12pt" fo:language="en" fo:country="US"/>
    </style:style>
    <style:style style:name="P22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Hostinger VPS deployment guide for the BookMyTime</text:p>
      <text:p text:style-name="P2"/>
      <text:p text:style-name="Normal">Name of the deployed project on the vps<text:span text:style-name="T3"><text:s/>:<text:s/></text:span><text:span text:style-name="T4">MediFlowAi</text:span></text:p>
      <text:list text:style-name="LFO1" text:continue-numbering="true">
        <text:list-item>
          <text:p text:style-name="P5"><text:span text:style-name="T6">Open Powershell and connect with vps using the<text:s/></text:span><text:span text:style-name="T7"><text:line-break/></text:span><text:span text:style-name="T8">Root : ssh root@77.37.47.89 <text:s/></text:span><text:span text:style-name="T9"><text:line-break/>Password : Atulvpsserver@2026</text:span></text:p>
        </text:list-item>
        <text:list-item>
          <text:p text:style-name="P10">Next<text:s/></text:p>
        </text:list-item>
      </text:list>
      <text:p text:style-name="ListParagraph">cd /var/www/MediFlowAi<text:s/></text:p>
      <text:p text:style-name="ListParagraph">git pull origin master (main)</text:p>
      <text:p text:style-name="ListParagraph">npm install npx<text:s/></text:p>
      <text:p text:style-name="ListParagraph">prisma generate npx<text:s/></text:p>
      <text:p text:style-name="ListParagraph">prisma db push</text:p>
      <text:p text:style-name="ListParagraph"><text:s/>npm run build<text:s/></text:p>
      <text:p text:style-name="ListParagraph">pm2 restart bookmytime<text:s/></text:p>
      <text:p text:style-name="ListParagraph">pm2 status</text:p>
      <text:p text:style-name="ListParagraph"/>
      <text:p text:style-name="P11"/>
      <text:p text:style-name="P12"/>
      <text:p text:style-name="Normal"><text:span text:style-name="T13">Database Details :<text:s/></text:span><text:span text:style-name="T14">BookMyTime<text:s/></text:span></text:p>
      <text:p text:style-name="P15">DATABASE_URL="mysql://bookmytime_remote:BookMyTimeRemote@123@77.37.47.89:3306/bookmytime"</text:p>
      <text:p text:style-name="P16"/>
      <text:p text:style-name="P17">DB_HOST="77.37.47.89"</text:p>
      <text:p text:style-name="P18">DB_PORT="3306"</text:p>
      <text:p text:style-name="P19">DB_USER="bookmytime_remote"</text:p>
      <text:p text:style-name="P20">DB_PASSWORD="BookMyTimeRemote@123"</text:p>
      <text:p text:style-name="P21">DB_NAME="bookmytime"</text:p>
      <text:p text:style-name="ListParagraph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wapnil Patil</meta:initial-creator>
    <dc:creator>Swapnil Patil</dc:creator>
    <meta:creation-date>2026-07-16T14:16:00Z</meta:creation-date>
    <dc:date>2026-07-16T14:24:00Z</dc:date>
    <meta:template xlink:href="Normal" xlink:type="simple"/>
    <meta:editing-cycles>1</meta:editing-cycles>
    <meta:editing-duration>PT420S</meta:editing-duration>
    <meta:document-statistic meta:page-count="1" meta:paragraph-count="1" meta:word-count="93" meta:character-count="623" meta:row-count="4" meta:non-whitespace-character-count="531"/>
  </office:meta>
</office:document-meta>
</file>