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rmala UI" svg:font-family="Nirmala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Nirmala UI" style:font-name-complex="Nirmala UI"/>
    </style:style>
    <style:style style:name="T23" style:parent-style-name="DefaultParagraphFont" style:family="text">
      <style:text-properties style:font-name="Nirmala UI" style:font-name-complex="Nirmala UI"/>
    </style:style>
    <style:style style:name="T24" style:parent-style-name="DefaultParagraphFont" style:family="text">
      <style:text-properties style:font-name="Nirmala UI" style:font-name-complex="Nirmala UI"/>
    </style:style>
    <style:style style:name="T25" style:parent-style-name="DefaultParagraphFont" style:family="text">
      <style:text-properties style:font-name="Nirmala UI" style:font-name-complex="Nirmala UI"/>
    </style:style>
    <style:style style:name="T26" style:parent-style-name="DefaultParagraphFont" style:family="text">
      <style:text-properties style:font-name="Nirmala UI" style:font-name-complex="Nirmala UI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/>VPS Deployment Guide</text:p>
      <text:p text:style-name="P2">Step 1: Make Changes in Your IDE</text:p>
      <text:p text:style-name="Normal">After completing your code changes:</text:p>
      <text:p text:style-name="Normal">git add .</text:p>
      <text:p text:style-name="Normal">git commit -m "feature update"</text:p>
      <text:p text:style-name="Normal">git push origin main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3">Step 2: Connect to Your VPS</text:p>
      <text:p text:style-name="Normal">ssh root@YOUR_SERVER_IP</text:p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4">Step 3: Navigate to the Project Directory</text:p>
      <text:p text:style-name="Normal">cd /var/www/MediFlowAi</text:p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5">Step 4: Pull the Latest Code</text:p>
      <text:p text:style-name="Normal">git pull origin main</text:p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6">Step 5: Install Dependencies (If New Packages Were Added)</text:p>
      <text:p text:style-name="Normal">npm install</text:p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7">Step 6: Update Prisma (Only If Database Schema Changed)</text:p>
      <text:p text:style-name="Normal">Generate Prisma Client:</text:p>
      <text:p text:style-name="Normal">npx prisma generate</text:p>
      <text:p text:style-name="Normal">Update Database Schema:</text:p>
      <text:p text:style-name="Normal">npx prisma db push</text:p>
      <text:p text:style-name="Normal">If using migrations:</text:p>
      <text:p text:style-name="Normal">npx prisma migrate deploy</text:p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8">Step 7: Build the Application</text:p>
      <text:p text:style-name="Normal">npm run build</text:p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9">Step 8: Restart the Application with PM2</text:p>
      <text:p text:style-name="Normal">Restart all applications:</text:p>
      <text:p text:style-name="Normal">pm2 restart all</text:p>
      <text:p text:style-name="Normal">Or restart a specific application:</text:p>
      <text:p text:style-name="Normal">pm2 restart mediflowai</text:p>
      <text:p text:style-name="Normal"><draw:custom-shape svg:x="0in" svg:y="0in" svg:width="45.51042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10">Step 9: Check Application Logs</text:p>
      <text:p text:style-name="Normal">View all logs:</text:p>
      <text:p text:style-name="Normal">pm2 logs</text:p>
      <text:p text:style-name="Normal">View logs for a specific application:</text:p>
      <text:p text:style-name="Normal">pm2 logs mediflowai</text:p>
      <text:p text:style-name="Normal"><draw:custom-shape svg:x="0in" svg:y="0in" svg:width="45.51042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11">Step 10: Verify PM2 Status</text:p>
      <text:p text:style-name="Normal">pm2 status</text:p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12">Quick Deployment Commands</text:p>
      <text:p text:style-name="Normal">Use these commands for a standard deployment:</text:p>
      <text:p text:style-name="Normal">cd /var/www/MediFlowAi</text:p>
      <text:p text:style-name="Normal"/>
      <text:p text:style-name="Normal">git pull origin main</text:p>
      <text:p text:style-name="Normal"/>
      <text:p text:style-name="Normal">npm install</text:p>
      <text:p text:style-name="Normal"/>
      <text:p text:style-name="Normal">npx prisma generate</text:p>
      <text:p text:style-name="Normal"/>
      <text:p text:style-name="Normal">npx prisma db push</text:p>
      <text:p text:style-name="Normal"/>
      <text:p text:style-name="Normal">npm run build</text:p>
      <text:p text:style-name="Normal"/>
      <text:p text:style-name="Normal">pm2 restart all</text:p>
      <text:p text:style-name="Normal"/>
      <text:p text:style-name="Normal">pm2 status</text:p>
      <text:p text:style-name="Normal"><draw:custom-shape svg:x="0in" svg:y="0in" svg:width="45.51042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13">If the Build Fails</text:p>
      <text:p text:style-name="Normal">Delete the existing build cache:</text:p>
      <text:p text:style-name="Normal">rm -rf .next</text:p>
      <text:p text:style-name="Normal">Rebuild the project:</text:p>
      <text:p text:style-name="Normal">npm run build</text:p>
      <text:p text:style-name="Normal">Restart PM2:</text:p>
      <text:p text:style-name="Normal">pm2 restart all</text:p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14">If the PM2 Process Is Missing</text:p>
      <text:p text:style-name="Normal">Start the application:</text:p>
      <text:p text:style-name="Normal">pm2 start npm --name mediflowai -- start</text:p>
      <text:p text:style-name="Normal">Save PM2 configuration:</text:p>
      <text:p text:style-name="Normal">pm2 save</text:p>
      <text:p text:style-name="Normal">Enable PM2 auto-start on server reboot:</text:p>
      <text:p text:style-name="Normal">pm2 startup</text:p>
      <text:p text:style-name="Normal"><draw:custom-shape svg:x="0in" svg:y="0in" svg:width="45.51042in" svg:height="0.00139in" draw:z-index="0" draw:id="id12" draw:style-name="a12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15">Notes</text:p>
      <text:list text:style-name="LFO1" text:continue-numbering="true">
        <text:list-item>
          <text:p text:style-name="P16">Run npm install only when new packages are added or updated.</text:p>
        </text:list-item>
        <text:list-item>
          <text:p text:style-name="P17">Run npx prisma db push only when the Prisma schema changes.</text:p>
        </text:list-item>
        <text:list-item>
          <text:p text:style-name="P18">Always run npm run build after pulling new code.</text:p>
        </text:list-item>
        <text:list-item>
          <text:p text:style-name="P19">PM2 keeps the application running even after you disconnect from SSH or close your terminal.</text:p>
        </text:list-item>
        <text:list-item>
          <text:p text:style-name="P20">After every deployment, verify the application status using:</text:p>
        </text:list-item>
      </text:list>
      <text:p text:style-name="Normal">pm2 status</text:p>
      <text:p text:style-name="Normal"/>
      <text:p text:style-name="Normal"/>
      <text:p text:style-name="P21">Quick Fix</text:p>
      <text:p text:style-name="Normal">package.json edit<text:s/><text:span text:style-name="T22">कर</text:span>:</text:p>
      <text:p text:style-name="Normal">nano package.json</text:p>
      <text:p text:style-name="Normal"><text:span text:style-name="T23">आणि</text:span><text:s/>dependency<text:s/><text:span text:style-name="T24">मधून</text:span><text:s/><text:span text:style-name="T25">हे</text:span><text:s/>remove<text:s/><text:span text:style-name="T26">कर</text:span>:</text:p>
      <text:p text:style-name="Normal">"@rolldown/binding-win32-x64-msvc": "1.1.1"</text:p>
      <text:p text:style-name="Normal">Save: CTRL+X → Y → ENTE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rmala UI" svg:font-family="Nirmala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wapnil Patil</meta:initial-creator>
    <dc:creator>Swapnil Patil</dc:creator>
    <meta:creation-date>2026-06-21T04:40:00Z</meta:creation-date>
    <dc:date>2026-06-21T17:42:00Z</dc:date>
    <meta:template xlink:href="Normal" xlink:type="simple"/>
    <meta:editing-cycles>3</meta:editing-cycles>
    <meta:editing-duration>PT46920S</meta:editing-duration>
    <meta:document-statistic meta:page-count="1" meta:paragraph-count="3" meta:word-count="292" meta:character-count="1959" meta:row-count="13" meta:non-whitespace-character-count="1670"/>
  </office:meta>
</office:document-meta>
</file>